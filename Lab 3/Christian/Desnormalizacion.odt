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6A000002C853898E1A.png" manifest:media-type="image/png"/>
  <manifest:file-entry manifest:full-path="Pictures/10000001000005740000022C7AD22638.png" manifest:media-type="image/png"/>
  <manifest:file-entry manifest:full-path="Pictures/100000010000056A000002C8E462D7DF.png" manifest:media-type="image/png"/>
  <manifest:file-entry manifest:full-path="Pictures/1000000100000572000002AA6DD6D826.png" manifest:media-type="image/png"/>
  <manifest:file-entry manifest:full-path="Pictures/100000010000056A000002C8C2E519F0.png" manifest:media-type="image/png"/>
  <manifest:file-entry manifest:full-path="Pictures/100000010000056C000002611B996FA5.png" manifest:media-type="image/png"/>
  <manifest:file-entry manifest:full-path="Pictures/100000010000056A000002C893598D27.png" manifest:media-type="image/png"/>
  <manifest:file-entry manifest:full-path="Pictures/100000010000055B000002B81D09438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c3426" officeooo:paragraph-rsid="001c3426"/>
    </style:style>
    <style:style style:name="P2" style:family="paragraph" style:parent-style-name="Text_20_body">
      <style:paragraph-properties fo:text-align="justify" style:justify-single-word="false"/>
      <style:text-properties officeooo:rsid="001c3426" officeooo:paragraph-rsid="001c3426"/>
    </style:style>
    <style:style style:name="P3" style:family="paragraph" style:parent-style-name="Text_20_body">
      <style:paragraph-properties fo:text-align="justify" style:justify-single-word="false"/>
      <style:text-properties officeooo:rsid="001c3426"/>
    </style:style>
    <style:style style:name="P4" style:family="paragraph" style:parent-style-name="Heading_20_3">
      <style:text-properties officeooo:rsid="001c3426" officeooo:paragraph-rsid="001c3426"/>
    </style:style>
    <style:style style:name="P5"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fo:font-size="11pt" officeooo:rsid="001c3426" style:font-size-asian="11pt" style:font-size-complex="11pt"/>
    </style:style>
    <style:style style:name="P6"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fo:font-size="11pt" fo:font-weight="bold" officeooo:rsid="001c3426" style:font-size-asian="11pt" style:font-size-complex="11pt"/>
    </style:style>
    <style:style style:name="P7"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officeooo:rsid="001c3426"/>
    </style:style>
    <style:style style:name="P8"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Google Sans Text" fo:font-size="11pt" officeooo:rsid="001ff43b" officeooo:paragraph-rsid="001ff43b" style:font-size-asian="11pt" style:font-size-complex="11pt"/>
    </style:style>
    <style:style style:name="P9" style:family="paragraph" style:parent-style-name="Standard">
      <style:text-properties officeooo:rsid="001c3426" officeooo:paragraph-rsid="001c3426"/>
    </style:style>
    <style:style style:name="P10" style:family="paragraph" style:parent-style-name="Standard">
      <style:text-properties officeooo:rsid="001ff43b" officeooo:paragraph-rsid="001c3426"/>
    </style:style>
    <style:style style:name="P11" style:family="paragraph" style:parent-style-name="Heading_20_3">
      <style:text-properties officeooo:rsid="001c3426" officeooo:paragraph-rsid="001ff43b"/>
    </style:style>
    <style:style style:name="P12"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fo:font-size="11pt" officeooo:rsid="001c3426" officeooo:paragraph-rsid="001ff43b" style:font-size-asian="11pt" style:font-size-complex="11pt"/>
    </style:style>
    <style:style style:name="P13"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officeooo:rsid="001c3426" officeooo:paragraph-rsid="001ff43b"/>
    </style:style>
    <style:style style:name="P14"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fo:font-size="11pt" fo:font-weight="bold" officeooo:rsid="001c3426" officeooo:paragraph-rsid="001ff43b" style:font-size-asian="11pt" style:font-size-complex="11pt"/>
    </style:style>
    <style:style style:name="P15" style:family="paragraph" style:parent-style-name="Standard">
      <style:text-properties officeooo:rsid="001e1950" officeooo:paragraph-rsid="001e1950"/>
    </style:style>
    <style:style style:name="P16" style:family="paragraph" style:parent-style-name="Heading_20_3">
      <style:text-properties officeooo:rsid="001e1950" officeooo:paragraph-rsid="001e1950"/>
    </style:style>
    <style:style style:name="P17"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officeooo:rsid="001e1950"/>
    </style:style>
    <style:style style:name="P18"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fo:font-size="11pt" officeooo:rsid="001e1950" style:font-size-asian="11pt" style:font-size-complex="11pt"/>
    </style:style>
    <style:style style:name="P19"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fo:font-size="11pt" fo:font-weight="bold" officeooo:rsid="001e1950" style:font-size-asian="11pt" style:font-size-complex="11pt"/>
    </style:style>
    <style:style style:name="P20" style:family="paragraph" style:parent-style-name="Standard">
      <style:text-properties officeooo:rsid="001ff43b" officeooo:paragraph-rsid="001ff43b"/>
    </style:style>
    <style:style style:name="P21" style:family="paragraph" style:parent-style-name="Heading_20_3">
      <style:text-properties officeooo:rsid="001ff43b" officeooo:paragraph-rsid="001ff43b"/>
    </style:style>
    <style:style style:name="P22"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fo:font-size="11pt" officeooo:rsid="001ff43b" style:font-size-asian="11pt" style:font-size-complex="11pt"/>
    </style:style>
    <style:style style:name="P23"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officeooo:rsid="001ff43b"/>
    </style:style>
    <style:style style:name="P24"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fo:font-size="11pt" fo:font-weight="bold" officeooo:rsid="001ff43b" style:font-size-asian="11pt" style:font-size-complex="11pt"/>
    </style:style>
    <style:style style:name="T1" style:family="text">
      <style:text-properties style:text-position="0% 100%" fo:font-size="11pt" style:font-size-asian="11pt" style:font-size-complex="11pt"/>
    </style:style>
    <style:style style:name="T2" style:family="text">
      <style:text-properties style:text-position="0% 100%" fo:font-size="11pt" fo:font-weight="bold" style:font-size-asian="11pt" style:font-size-complex="11pt"/>
    </style:style>
    <style:style style:name="T3" style:family="text">
      <style:text-properties fo:font-family="'Google Sans', sans-serif" fo:font-size="12pt" style:font-size-asian="12pt" style:font-size-complex="12pt"/>
    </style:style>
    <style:style style:name="T4" style:family="text">
      <style:text-properties style:font-name="Google Sans Text" fo:font-size="12pt" style:font-size-asian="12pt" style:font-size-complex="12pt"/>
    </style:style>
    <style:style style:name="T5" style:family="text">
      <style:text-properties fo:font-weight="bold"/>
    </style:style>
    <style:style style:name="T6" style:family="text">
      <style:text-properties officeooo:rsid="001ff43b"/>
    </style:style>
    <style:style style:name="T7" style:family="text">
      <style:text-properties style:font-name="Google Sans Text" fo:font-size="11pt" fo:font-weight="bold" style:font-size-asian="11pt" style:font-size-complex="11pt"/>
    </style:style>
    <style:style style:name="T8" style:family="text">
      <style:text-properties style:font-name="Google Sans Text" fo:font-size="11pt" style:font-size-asian="11pt" style:font-size-complex="11pt"/>
    </style:style>
    <style:style style:name="T9" style:family="text">
      <style:text-properties style:font-name="Google Sans Text" fo:font-size="11pt" fo:font-style="italic"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STIFICACIÓN DE REDUNDANCIA CONTROLADA</text:p>
      <text:p text:style-name="P2"><text:span text:style-name="T1">La normalización clásica (hasta la 3FN) busca eliminar la redundancia para garantizar la integridad y minimizar el almacenamiento físico. Sin embargo, en entornos empresariales con una alta tasa de consultas operativas y gerenciales, el costo computacional de reconstruir la información mediante uniones (</text:span><text:span text:style-name="Source_20_Text"><text:span text:style-name="T1">JOINs</text:span></text:span><text:span text:style-name="T1">) e iteraciones aritméticas degrada severamente el rendimiento del servidor.</text:span></text:p>
      <text:p text:style-name="P3"><text:span text:style-name="T1">Al aplicar </text:span><text:span text:style-name="T2">desnormalización estratégica</text:span><text:span text:style-name="T1">, se introduce redundancia controlada de datos con un propósito claro: intercambiar un costo marginal de espacio en disco por una aceleración crítica en el tiempo de respuesta de las consultas, minimizando el uso de CPU y memoria RAM.</text:span></text:p>
      <text:h text:style-name="P4" text:outline-level="3"><text:span text:style-name="T3">CASO 1: <text:s/>(</text:span><text:span text:style-name="Source_20_Text"><text:span text:style-name="T4">REPORTE_VENTAS_DIARIAS</text:span></text:span><text:span text:style-name="T3">)</text:span></text:h>
      <text:list text:style-name="L1">
        <text:list-item>
          <text:p text:style-name="P5"><text:span text:style-name="T5">Tipo de Relación Normalizada:</text:span> 1 <text:span text:style-name="T6">a </text:span>N (Una cabecera de venta posee múltiples registros de detalle).</text:p>
        </text:list-item>
        <text:list-item>
          <text:p text:style-name="P5"><text:span text:style-name="T5">Estrategia Aplicada:</text:span> Embebimiento de atributos relacionales de orden superior (Cabecera, Clientes, Empleados) en el plano inferior de almacenamiento (Detalle de Ventas).</text:p>
        </text:list-item>
        <text:list-item>
          <text:p text:style-name="P6">Justificación Técnica:</text:p>
          <text:list>
            <text:list-item>
              <text:p text:style-name="P7"><text:span text:style-name="T7">Eliminación del Cuello de Botella del Optimizador (CBO):</text:span><text:span text:style-name="T8"> En el modelo original, resolver un reporte comercial diario forzaba a Oracle a analizar y correlacionar cinco estructuras físicas distintas (</text:span><text:span text:style-name="Source_20_Text"><text:span text:style-name="T8">VENTAS</text:span></text:span><text:span text:style-name="T8">, </text:span><text:span text:style-name="Source_20_Text"><text:span text:style-name="T8">DETALLE_VENTAS</text:span></text:span><text:span text:style-name="T8">, </text:span><text:span text:style-name="Source_20_Text"><text:span text:style-name="T8">CLIENTES</text:span></text:span><text:span text:style-name="T8">, </text:span><text:span text:style-name="Source_20_Text"><text:span text:style-name="T8">EMPLEADOS</text:span></text:span><text:span text:style-name="T8">, </text:span><text:span text:style-name="Source_20_Text"><text:span text:style-name="T8">PRODUCTOS</text:span></text:span><text:span text:style-name="T8">) evaluando planes complejos basados en algoritmos como </text:span><text:span text:style-name="T9">Hash Joins</text:span><text:span text:style-name="T8"> o </text:span><text:span text:style-name="T9">Nested Loops</text:span><text:span text:style-name="T8">.</text:span></text:p>
            </text:list-item>
            <text:list-item>
              <text:p text:style-name="P7"><text:span text:style-name="T7">Co-localidad de Datos en Disco:</text:span><text:span text:style-name="T8"> Al aplanar la información, los datos que se consultan juntos se almacenan físicamente contiguos en el mismo archivo de datos (</text:span><text:span text:style-name="Source_20_Text"><text:span text:style-name="T8">tbs_gcdistribuidor_datos</text:span></text:span><text:span text:style-name="T8">). El motor ejecuta un único </text:span><text:span text:style-name="T9">Index Range Scan</text:span><text:span text:style-name="T8"> o </text:span><text:span text:style-name="T9">Table Access Full</text:span><text:span text:style-name="T8"> secuencial, reduciendo las operaciones de Entrada/Salida (I/O) en disco y optimizando el espacio del </text:span><text:span text:style-name="T7">Buffer Cache</text:span><text:span text:style-name="T8"> de la SGA, evitando que los datos desborden hacia el área de intercambio temporal de la </text:span><text:span text:style-name="T7">PGA</text:span><text:span text:style-name="T8">.</text:span></text:p>
            </text:list-item>
          </text:list>
        </text:list-item>
      </text:list>
      <text:p text:style-name="P8">Se puede observar en las imagenes el tiempo de demora en la consulta, con JOIN tiene un tiempo de 360 ms y con un select 350 ms</text:p>
      <text:p text:style-name="P9"><draw:frame draw:style-name="fr1" draw:name="Imagen1" text:anchor-type="char" svg:width="17cm" svg:height="8.629cm" draw:z-index="0"><draw:image xlink:href="Pictures/100000010000055B000002B81D09438B.png" xlink:type="simple" xlink:show="embed" xlink:actuate="onLoad" draw:mime-type="image/png"/></draw:frame><text:soft-page-break/>con desnormalizacion</text:p>
      <text:p text:style-name="P10"><draw:frame draw:style-name="fr1" draw:name="Imagen2" text:anchor-type="char" svg:width="17cm" svg:height="7.458cm" draw:z-index="1"><draw:image xlink:href="Pictures/100000010000056C000002611B996FA5.png" xlink:type="simple" xlink:show="embed" xlink:actuate="onLoad" draw:mime-type="image/png"/></draw:frame></text:p>
      <text:h text:style-name="P11" text:outline-level="3"><text:span text:style-name="T3">CASO 2: <text:s/>(</text:span><text:span text:style-name="Source_20_Text"><text:span text:style-name="T4">PRODUCTOS_CATALOGO_STOCK</text:span></text:span><text:span text:style-name="T3">)</text:span></text:h>
      <text:list text:style-name="L2">
        <text:list-item>
          <text:p text:style-name="P12"><text:span text:style-name="T5">Tipo de Relación Normalizada:</text:span> 1 a 1 /1 a N controlado (Un registro maestro de producto se extiende a un control de stock único y a múltiples registros de transacciones históricas).</text:p>
        </text:list-item>
        <text:list-item>
          <text:p text:style-name="P13"><text:span text:style-name="T7">Estrategia Aplicada:</text:span><text:span text:style-name="T8"> Combinación de tablas paralelas en una sola entidad descriptiva e inclusión de campos calculados estáticos (</text:span><text:span text:style-name="Source_20_Text"><text:span text:style-name="T8">total_unidades_vendidas</text:span></text:span><text:span text:style-name="T8">, </text:span><text:span text:style-name="Source_20_Text"><text:span text:style-name="T8">total_ingresos_generados</text:span></text:span><text:span text:style-name="T8">).</text:span></text:p>
        </text:list-item>
        <text:list-item>
          <text:p text:style-name="P14">Justificación Técnica:</text:p>
          <text:list>
            <text:list-item>
              <text:p text:style-name="P13"><text:span text:style-name="T7">Supresión de Agregaciones en Tiempo de Ejecución ($O(1)$ vs $O(N)$):</text:span><text:span text:style-name="T8"> Calcular funciones agregadas como </text:span><text:span text:style-name="Source_20_Text"><text:span text:style-name="T8">SUM()</text:span></text:span><text:span text:style-name="T8"> o </text:span><text:span text:style-name="Source_20_Text"><text:span text:style-name="T8">COUNT()</text:span></text:span><text:span text:style-name="T8"> en tiempo real obliga al procesador a escanear potencialmente millones de filas históricas de ventas individuales para devolver un simple valor métrico corporativo.</text:span></text:p>
            </text:list-item>
            <text:list-item>
              <text:p text:style-name="P13"><text:soft-page-break/><text:span text:style-name="T7">Protección de la Memoria de Ordenamiento (PGA):</text:span><text:span text:style-name="T8"> Al precalcular y persistir estos datos, la consulta pasa de una complejidad algorítmica lineal a una lectura constante directa. Oracle ya no requiere reservar zonas extensas de la PGA para realizar operaciones de agrupamiento (</text:span><text:span text:style-name="Source_20_Text"><text:span text:style-name="T8">GROUP BY</text:span></text:span><text:span text:style-name="T8">), liberando memoria RAM de inmediato para atender solicitudes concurrentes de otros usuarios.</text:span></text:p>
            </text:list-item>
          </text:list>
        </text:list-item>
      </text:list>
      <text:p text:style-name="P8">Se puede observar en las imagenes el tiempo de demora en la consulta, con JOIN tiene un tiempo de 3 ms y con un select 331 ms</text:p>
      <text:p text:style-name="P9"><draw:frame draw:style-name="fr1" draw:name="Imagen3" text:anchor-type="char" svg:width="17cm" svg:height="8.733cm" draw:z-index="2"><draw:image xlink:href="Pictures/100000010000056A000002C8C2E519F0.png" xlink:type="simple" xlink:show="embed" xlink:actuate="onLoad" draw:mime-type="image/png"/></draw:frame>desnormalizado</text:p>
      <text:p text:style-name="P9"/>
      <text:p text:style-name="P15"><draw:frame draw:style-name="fr1" draw:name="Imagen4" text:anchor-type="char" svg:width="17cm" svg:height="8.733cm" draw:z-index="3"><draw:image xlink:href="Pictures/100000010000056A000002C8E462D7DF.png" xlink:type="simple" xlink:show="embed" xlink:actuate="onLoad" draw:mime-type="image/png"/></draw:frame></text:p>
      <text:h text:style-name="P16" text:outline-level="3"><text:soft-page-break/><text:span text:style-name="T3">CASO 3: (</text:span><text:span text:style-name="Source_20_Text"><text:span text:style-name="T4">CATALOGO_PROVEEDORES_PRODUCTOS</text:span></text:span><text:span text:style-name="T3">)</text:span></text:h>
      <text:list text:style-name="L3">
        <text:list-item>
          <text:p text:style-name="P17"><text:span text:style-name="T7">Tipo de Relación Normalizada:</text:span><text:span text:style-name="T8"> N a <text:s/>M (Varios proveedores surten múltiples productos mediante la tabla de rompimiento de ciclo </text:span><text:span text:style-name="Source_20_Text"><text:span text:style-name="T8">PROVEEDOR_PRODUCTO</text:span></text:span><text:span text:style-name="T8">).</text:span></text:p>
        </text:list-item>
        <text:list-item>
          <text:p text:style-name="P18"><text:span text:style-name="T5">Estrategia Aplicada:</text:span> Desnormalización de relación cruzada por duplicación masiva bidireccional de atributos descriptivos.</text:p>
        </text:list-item>
        <text:list-item>
          <text:p text:style-name="P19">Justificación Técnica:</text:p>
          <text:list>
            <text:list-item>
              <text:p text:style-name="P18"><text:span text:style-name="T5">Evitar la Doble Operación de Búsqueda de Índices:</text:span> Tradicionalmente, para conocer los costos logísticos de reposición de stock, el motor realizaba un salto indirecto: buscaba en el índice del proveedor, saltaba a la tabla puente asociativa intermedia, recuperaba las llaves foráneas y volvía a saltar al índice maestro de productos.</text:p>
            </text:list-item>
            <text:list-item>
              <text:p text:style-name="P17"><text:span text:style-name="T7">Aceleración de Consultas del Módulo de Compras:</text:span><text:span text:style-name="T8"> Al unificar los datos esenciales del proveedor, marcas y precios de compra en una sola estructura física, se mitiga por completo el impacto del encadenamiento de punteros. El departamento de compras puede listar catálogos enteros de suministro con un </text:span><text:span text:style-name="Source_20_Text"><text:span text:style-name="T8">SELECT</text:span></text:span><text:span text:style-name="T8"> plano, lo que garantiza tiempos de respuesta inferiores al milisegundo bajo escenarios de alta concurrencia operacional.</text:span></text:p>
            </text:list-item>
          </text:list>
        </text:list-item>
      </text:list>
      <text:p text:style-name="P8">Se puede observar en las imagenes el tiempo de demora en la consulta, con JOIN tiene un tiempo de 355 ms y con un select 357 ms, en este caso el select se demora mas pero es por la cantidad de datos existentes</text:p>
      <text:p text:style-name="P15"><text:s/><text:tab/></text:p>
      <text:p text:style-name="P15"><draw:frame draw:style-name="fr1" draw:name="Imagen5" text:anchor-type="char" svg:width="17cm" svg:height="8.733cm" draw:z-index="4"><draw:image xlink:href="Pictures/100000010000056A000002C853898E1A.png" xlink:type="simple" xlink:show="embed" xlink:actuate="onLoad" draw:mime-type="image/png"/></draw:frame>desnormalizado</text:p>
      <text:p text:style-name="P15"/>
      <text:p text:style-name="P20"><draw:frame draw:style-name="fr1" draw:name="Imagen6" text:anchor-type="char" svg:width="17cm" svg:height="8.733cm" draw:z-index="5"><draw:image xlink:href="Pictures/100000010000056A000002C893598D27.png" xlink:type="simple" xlink:show="embed" xlink:actuate="onLoad" draw:mime-type="image/png"/></draw:frame><text:soft-page-break/></text:p>
      <text:p text:style-name="P20"/>
      <text:h text:style-name="P21" text:outline-level="3"><text:span text:style-name="T3">CASO 4 : (</text:span><text:span text:style-name="Source_20_Text"><text:span text:style-name="T4">HISTORICO_PRECIOS_CONGELADOS</text:span></text:span><text:span text:style-name="T3">)</text:span></text:h>
      <text:list text:style-name="L4">
        <text:list-item>
          <text:p text:style-name="P22"><text:span text:style-name="T5">Tipo de Relación Normalizada:</text:span> 1 a <text:s/>N (Relación maestra del producto reutilizada dinámicamente en múltiples líneas de facturación).</text:p>
        </text:list-item>
        <text:list-item>
          <text:p text:style-name="P23"><text:span text:style-name="T7">Estrategia Aplicada:</text:span><text:span text:style-name="T8"> Introducción de Columnas de Instantánea (Snapshot Columns) acompañadas del campo redundante precalculado matemático </text:span><text:span text:style-name="Source_20_Text"><text:span text:style-name="T8">subtotal_congelado</text:span></text:span><text:span text:style-name="T8">.</text:span></text:p>
        </text:list-item>
        <text:list-item>
          <text:p text:style-name="P24">Justificación Técnica:</text:p>
          <text:list>
            <text:list-item>
              <text:p text:style-name="P23"><text:span text:style-name="T7">Consumo de CPU igual a cero en operaciones aritméticas:</text:span><text:span text:style-name="T8"> Realizar operaciones matemáticas al vuelo dentro de una cláusula </text:span><text:span text:style-name="Source_20_Text"><text:span text:style-name="T8">SELECT</text:span></text:span><text:span text:style-name="T8"> (ej. </text:span><text:span text:style-name="Source_20_Text"><text:span text:style-name="T8">cantidad * precio</text:span></text:span><text:span text:style-name="T8">) obliga a la Unidad Aritmético-Lógica (ALU) del microprocesador a calcular el producto numérico flotante para cada fila devuelta en tiempo real. Al almacenar el resultado de la multiplicación de manera física en el momento exacto de la inserción, el query se limita a transferir datos en crudo sin gasto alguno de ciclos de reloj de la CPU.</text:span></text:p>
            </text:list-item>
            <text:list-item>
              <text:p text:style-name="P23"><text:span text:style-name="T7">Blindaje de Integridad Temporal (Consistencia Financiera):</text:span><text:span text:style-name="T8"> Este caso representa el ejemplo perfecto donde la desnormalización aporta valor no solo en rendimiento, sino en lógica de negocio. Si el precio maestro de un producto cambia en la tabla </text:span><text:span text:style-name="Source_20_Text"><text:span text:style-name="T8">PRODUCTOS</text:span></text:span><text:span text:style-name="T8"> debido a la inflación o estrategias comerciales actuales, el registro histórico financiero guardado permanece inalterable y consistente en su propia celda, garantizando auditorías contables fidedignas y evitando consultas de joins hacia tablas maestras volátiles.</text:span></text:p>
            </text:list-item>
          </text:list>
        </text:list-item>
      </text:list>
      <text:p text:style-name="P8">Se puede observar en las imagenes el tiempo de demora en la consulta, con JOIN tiene un tiempo de 348 ms y con un select 333 ms</text:p>
      <text:p text:style-name="P20"/>
      <text:p text:style-name="P15"><draw:frame draw:style-name="fr1" draw:name="Imagen7" text:anchor-type="char" svg:width="17cm" svg:height="6.77cm" draw:z-index="6"><draw:image xlink:href="Pictures/10000001000005740000022C7AD22638.png" xlink:type="simple" xlink:show="embed" xlink:actuate="onLoad" draw:mime-type="image/png"/></draw:frame><text:soft-page-break/></text:p>
      <text:p text:style-name="P15">desnormalizado</text:p>
      <text:p text:style-name="P15"/>
      <text:p text:style-name="P15"><draw:frame draw:style-name="fr2" draw:name="Imagen8" text:anchor-type="char" svg:width="17cm" svg:height="8.317cm" draw:z-index="7"><draw:image xlink:href="Pictures/1000000100000572000002AA6DD6D826.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8T19:17:49.361154328</meta:creation-date>
    <dc:date>2026-07-18T19:52:19.687559956</dc:date>
    <meta:editing-duration>PT13M25S</meta:editing-duration>
    <meta:editing-cycles>1</meta:editing-cycles>
    <meta:document-statistic meta:table-count="0" meta:image-count="8" meta:object-count="0" meta:page-count="6" meta:paragraph-count="36" meta:word-count="898" meta:character-count="5998" meta:non-whitespace-character-count="5149"/>
    <meta:generator>LibreOffice/26.2.4.2$Linux_X86_64 LibreOffice_project/3346a99e6b841765b75a9b29714a5b95c6761ce3</meta:generator>
  </office:meta>
</office:document-meta>
</file>